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bb3a6" style:font-weight-asian="bold" style:font-weight-complex="bold"/>
    </style:style>
    <style:style style:name="P3" style:family="paragraph" style:parent-style-name="Standard">
      <style:text-properties fo:font-weight="bold" officeooo:paragraph-rsid="00266c09" style:font-weight-asian="bold" style:font-weight-complex="bold"/>
    </style:style>
    <style:style style:name="P4" style:family="paragraph" style:parent-style-name="Standard">
      <style:text-properties fo:font-weight="bold" officeooo:paragraph-rsid="0027e1a2" style:font-weight-asian="bold" style:font-weight-complex="bold"/>
    </style:style>
    <style:style style:name="P5" style:family="paragraph" style:parent-style-name="Standard">
      <style:text-properties fo:font-weight="bold" officeooo:paragraph-rsid="0028392b" style:font-weight-asian="bold" style:font-weight-complex="bold"/>
    </style:style>
    <style:style style:name="P6" style:family="paragraph" style:parent-style-name="Standard">
      <style:text-properties fo:font-weight="bold" officeooo:paragraph-rsid="0037ee16" style:font-weight-asian="bold" style:font-weight-complex="bold"/>
    </style:style>
    <style:style style:name="P7" style:family="paragraph" style:parent-style-name="Standard">
      <style:text-properties fo:font-weight="bold" officeooo:paragraph-rsid="003a7a0a" style:font-weight-asian="bold" style:font-weight-complex="bold"/>
    </style:style>
    <style:style style:name="P8" style:family="paragraph" style:parent-style-name="Standard">
      <style:text-properties officeooo:paragraph-rsid="001a56e8"/>
    </style:style>
    <style:style style:name="P9" style:family="paragraph" style:parent-style-name="Standard">
      <style:text-properties officeooo:paragraph-rsid="001feb33"/>
    </style:style>
    <style:style style:name="P10" style:family="paragraph" style:parent-style-name="Standard">
      <style:text-properties officeooo:paragraph-rsid="00262440"/>
    </style:style>
    <style:style style:name="P11" style:family="paragraph" style:parent-style-name="Standard">
      <style:text-properties officeooo:paragraph-rsid="0028392b"/>
    </style:style>
    <style:style style:name="P12" style:family="paragraph" style:parent-style-name="Standard">
      <style:text-properties fo:font-style="italic" style:font-style-asian="italic" style:font-style-complex="italic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bold" officeooo:rsid="000f1263" officeooo:paragraph-rsid="000f1263" style:font-weight-asian="bold" style:font-weight-complex="bold"/>
    </style:style>
    <style:style style:name="P15" style:family="paragraph" style:parent-style-name="Text_20_body">
      <style:text-properties fo:font-weight="bold" officeooo:paragraph-rsid="0028392b" style:font-weight-asian="bold" style:font-weight-complex="bold"/>
    </style:style>
    <style:style style:name="P16" style:family="paragraph" style:parent-style-name="Text_20_body">
      <style:text-properties fo:font-weight="normal" style:font-weight-asian="normal" style:font-weight-complex="normal"/>
    </style:style>
    <style:style style:name="P17" style:family="paragraph" style:parent-style-name="Text_20_body">
      <style:text-properties officeooo:paragraph-rsid="000f1263"/>
    </style:style>
    <style:style style:name="P18" style:family="paragraph" style:parent-style-name="Text_20_body">
      <style:text-properties officeooo:rsid="000f1263" officeooo:paragraph-rsid="000f1263"/>
    </style:style>
    <style:style style:name="P19" style:family="paragraph" style:parent-style-name="Text_20_body">
      <style:text-properties officeooo:paragraph-rsid="0028392b"/>
    </style:style>
    <style:style style:name="P20" style:family="paragraph" style:parent-style-name="Text_20_body">
      <style:text-properties officeooo:paragraph-rsid="002aacf2"/>
    </style:style>
    <style:style style:name="P21" style:family="paragraph" style:parent-style-name="Text_20_body">
      <style:text-properties fo:font-style="italic" officeooo:rsid="000f1263" officeooo:paragraph-rsid="0023915b" style:font-style-asian="italic" style:font-style-complex="italic"/>
    </style:style>
    <style:style style:name="P22" style:family="paragraph" style:parent-style-name="Standard">
      <style:text-properties fo:font-weight="bold" officeooo:rsid="00266c09" officeooo:paragraph-rsid="00266c09" style:font-weight-asian="bold" style:font-weight-complex="bold"/>
    </style:style>
    <style:style style:name="P23" style:family="paragraph" style:parent-style-name="Standard">
      <style:text-properties fo:font-weight="bold" officeooo:rsid="00349b93" officeooo:paragraph-rsid="00349b93" style:font-weight-asian="bold" style:font-weight-complex="bold"/>
    </style:style>
    <style:style style:name="P24" style:family="paragraph" style:parent-style-name="Standard">
      <style:text-properties officeooo:rsid="001932eb" officeooo:paragraph-rsid="0028392b"/>
    </style:style>
    <style:style style:name="P25" style:family="paragraph" style:parent-style-name="Standard">
      <style:text-properties officeooo:paragraph-rsid="0042e911"/>
    </style:style>
    <style:style style:name="P26" style:family="paragraph" style:parent-style-name="Text_20_body">
      <style:text-properties fo:font-style="italic" officeooo:rsid="002aacf2" officeooo:paragraph-rsid="002aacf2" style:font-style-asian="italic" style:font-style-complex="italic"/>
    </style:style>
    <style:style style:name="P27" style:family="paragraph" style:parent-style-name="Text_20_body">
      <style:text-properties fo:font-weight="bold" style:font-weight-asian="bold" style:font-weight-complex="bold"/>
    </style:style>
    <style:style style:name="P28" style:family="paragraph" style:parent-style-name="Text_20_body">
      <style:text-properties fo:font-weight="normal" style:font-weight-asian="normal" style:font-weight-complex="normal"/>
    </style:style>
    <style:style style:name="P29" style:family="paragraph" style:parent-style-name="Heading_20_1">
      <style:text-properties officeooo:paragraph-rsid="00262440"/>
    </style:style>
    <style:style style:name="P30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7e1a2" style:font-style-asian="italic" style:font-style-complex="italic"/>
    </style:style>
    <style:style style:name="T3" style:family="text">
      <style:text-properties fo:font-style="italic" officeooo:rsid="0028392b" style:font-style-asian="italic" style:font-style-complex="italic"/>
    </style:style>
    <style:style style:name="T4" style:family="text">
      <style:text-properties fo:font-style="italic" officeooo:rsid="00266c09" style:font-style-asian="italic" style:font-style-complex="italic"/>
    </style:style>
    <style:style style:name="T5" style:family="text">
      <style:text-properties fo:font-style="italic" officeooo:rsid="0031af8e" style:font-style-asian="italic" style:font-style-complex="italic"/>
    </style:style>
    <style:style style:name="T6" style:family="text">
      <style:text-properties fo:font-style="italic" officeooo:rsid="003a7a0a" style:font-style-asian="italic" style:font-style-complex="italic"/>
    </style:style>
    <style:style style:name="T7" style:family="text">
      <style:text-properties fo:font-weight="normal" officeooo:rsid="0028392b" style:font-weight-asian="normal" style:font-weight-complex="normal"/>
    </style:style>
    <style:style style:name="T8" style:family="text">
      <style:text-properties fo:font-weight="normal" officeooo:rsid="002a102b" style:font-weight-asian="normal" style:font-weight-complex="normal"/>
    </style:style>
    <style:style style:name="T9" style:family="text">
      <style:text-properties officeooo:rsid="0008bd26"/>
    </style:style>
    <style:style style:name="T10" style:family="text">
      <style:text-properties officeooo:rsid="000e16a8"/>
    </style:style>
    <style:style style:name="T11" style:family="text">
      <style:text-properties officeooo:rsid="000f1263"/>
    </style:style>
    <style:style style:name="T12" style:family="text">
      <style:text-properties officeooo:rsid="0011cb8b"/>
    </style:style>
    <style:style style:name="T13" style:family="text">
      <style:text-properties officeooo:rsid="0015361f"/>
    </style:style>
    <style:style style:name="T14" style:family="text">
      <style:text-properties officeooo:rsid="001833d1"/>
    </style:style>
    <style:style style:name="T15" style:family="text">
      <style:text-properties officeooo:rsid="001932eb"/>
    </style:style>
    <style:style style:name="T16" style:family="text">
      <style:text-properties officeooo:rsid="001a56e8"/>
    </style:style>
    <style:style style:name="T17" style:family="text">
      <style:text-properties officeooo:rsid="001bb3a6"/>
    </style:style>
    <style:style style:name="T18" style:family="text">
      <style:text-properties officeooo:rsid="001d4e58"/>
    </style:style>
    <style:style style:name="T19" style:family="text">
      <style:text-properties officeooo:rsid="001e5621"/>
    </style:style>
    <style:style style:name="T20" style:family="text">
      <style:text-properties officeooo:rsid="001f633e"/>
    </style:style>
    <style:style style:name="T21" style:family="text">
      <style:text-properties officeooo:rsid="001feb33"/>
    </style:style>
    <style:style style:name="T22" style:family="text">
      <style:text-properties officeooo:rsid="00262440"/>
    </style:style>
    <style:style style:name="T23" style:family="text">
      <style:text-properties officeooo:rsid="00266c09"/>
    </style:style>
    <style:style style:name="T24" style:family="text">
      <style:text-properties officeooo:rsid="0027e1a2"/>
    </style:style>
    <style:style style:name="T25" style:family="text">
      <style:text-properties officeooo:rsid="0028392b"/>
    </style:style>
    <style:style style:name="T26" style:family="text">
      <style:text-properties officeooo:rsid="002a102b"/>
    </style:style>
    <style:style style:name="T27" style:family="text">
      <style:text-properties officeooo:rsid="002aacf2"/>
    </style:style>
    <style:style style:name="T28" style:family="text">
      <style:text-properties officeooo:rsid="002b3faa"/>
    </style:style>
    <style:style style:name="T29" style:family="text">
      <style:text-properties officeooo:rsid="002da60d"/>
    </style:style>
    <style:style style:name="T30" style:family="text">
      <style:text-properties officeooo:rsid="002f47b1"/>
    </style:style>
    <style:style style:name="T31" style:family="text">
      <style:text-properties officeooo:rsid="003093b2"/>
    </style:style>
    <style:style style:name="T32" style:family="text">
      <style:text-properties officeooo:rsid="00309ad4"/>
    </style:style>
    <style:style style:name="T33" style:family="text">
      <style:text-properties officeooo:rsid="0031af8e"/>
    </style:style>
    <style:style style:name="T34" style:family="text">
      <style:text-properties officeooo:rsid="0032bc0e"/>
    </style:style>
    <style:style style:name="T35" style:family="text">
      <style:text-properties officeooo:rsid="00347165"/>
    </style:style>
    <style:style style:name="T36" style:family="text">
      <style:text-properties officeooo:rsid="0037ee16"/>
    </style:style>
    <style:style style:name="T37" style:family="text">
      <style:text-properties officeooo:rsid="003a7a0a"/>
    </style:style>
    <style:style style:name="T38" style:family="text">
      <style:text-properties fo:font-style="normal" officeooo:rsid="003a7a0a" style:font-style-asian="normal" style:font-style-complex="normal"/>
    </style:style>
    <style:style style:name="T39" style:family="text">
      <style:text-properties officeooo:rsid="004051af"/>
    </style:style>
    <style:style style:name="T40" style:family="text">
      <style:text-properties officeooo:rsid="004127a5"/>
    </style:style>
    <style:style style:name="T41" style:family="text">
      <style:text-properties officeooo:rsid="0042945c"/>
    </style:style>
    <style:style style:name="T42" style:family="text">
      <style:text-properties officeooo:rsid="0042e911"/>
    </style:style>
    <style:style style:name="T43" style:family="text">
      <style:text-properties officeooo:rsid="0043cf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ercise (Setup)</text:h>
      <text:p text:style-name="Text_20_body"/>
      <text:p text:style-name="P13">Make a ~/bin directory (for programs) and add it to your path</text:p>
      <text:p text:style-name="Text_20_body">% cd <text:s text:c="23"/><text:tab/><text:tab/><text:tab/><text:tab/><text:tab/>// go to your home directory</text:p>
      <text:p text:style-name="Text_20_body">% mkdir bin <text:s text:c="11"/><text:tab/><text:tab/><text:tab/><text:tab/><text:tab/>// make a subdirectory</text:p>
      <text:p text:style-name="Text_20_body">% nano .bashrc<text:tab/> <text:s text:c="3"/><text:tab/><text:tab/><text:tab/><text:tab/>// edit the startup script</text:p>
      <text:p text:style-name="Text_20_body">&lt;Add a line “PATH=~/bin:$PATH”&gt;</text:p>
      <text:p text:style-name="Text_20_body">&lt;start a new terminal&gt;</text:p>
      <text:p text:style-name="Text_20_body">% echo $PATH <text:s text:c="56"/>// check that ~/bin is in PATH</text:p>
      <text:p text:style-name="P13"/>
      <text:p text:style-name="P13">Download the <text:span text:style-name="T10">alignment</text:span> files we will use:</text:p>
      <text:p text:style-name="Text_20_body">% cd</text:p>
      <text:p text:style-name="Text_20_body">% mkdir alignment_files</text:p>
      <text:p text:style-name="P17">% <text:span text:style-name="T9">cd ~/</text:span><text:span text:style-name="T9">alignment_files</text:span></text:p>
      <text:p text:style-name="P21">&lt;Download the files&gt;</text:p>
      <text:p text:style-name="P17"><text:span text:style-name="T9">% </text:span><text:span text:style-name="T11">wget http://nucleus.biology.duke.edu/~bredelings/examples.tgz </text:span></text:p>
      <text:p text:style-name="Text_20_body">% <text:span text:style-name="T11">tar -zxf examples.tgz <text:s text:c="38"/><text:tab/>// extract the compressed archive</text:span></text:p>
      <text:p text:style-name="Text_20_body"><text:span text:style-name="T9">% </text:span><text:span text:style-name="T11">ls examples<text:tab/><text:tab/><text:tab/><text:tab/><text:tab/><text:tab/>// look inside the new directory that was created</text:span></text:p>
      <text:p text:style-name="P18">% less examples/5S-rRNA/5d.fasta <text:s text:c="25"/>// examine the downloaded files – type q to quit</text:p>
      <text:p text:style-name="P18">% alignment-info examples/5S-rRNA/5d.fasta</text:p>
      <text:p text:style-name="P14"/>
      <text:p text:style-name="P13">Move the <text:span text:style-name="T1">fasta-flip.pl</text:span> script into ~/bin</text:p>
      <text:p text:style-name="P16">% cd ~/alignment_files/<text:span text:style-name="T12">examples</text:span></text:p>
      <text:p text:style-name="P16">% chmod +x fasta-flip.pl<text:tab/><text:tab/><text:tab/><text:tab/>// make the file executable</text:p>
      <text:p text:style-name="P16">% cp fasta-flip.pl ~/bin<text:tab/><text:tab/><text:tab/><text:tab/>// copy the file to ~/bin</text:p>
      <text:p text:style-name="P16">% which fasta-flip.pl<text:tab/><text:tab/><text:tab/><text:tab/><text:tab/>// check to make sure its in your PATH</text:p>
      <text:p text:style-name="P16">% <text:span text:style-name="T13">cp 5S-rRNA/25.fasta .<text:tab/><text:tab/><text:tab/><text:tab/>// make a copy of a file</text:span></text:p>
      <text:p text:style-name="P16">% fasta-flip.pl <text:span text:style-name="T9">25</text:span>.fasta &gt; <text:span text:style-name="T9">25-</text:span>flipped.fasta<text:tab/> <text:tab/>// try reversing a FASTA file</text:p>
      <text:p text:style-name="P16"/>
      <text:h text:style-name="P30" text:outline-level="1">Exercise (muscle, HoT)</text:h>
      <text:p text:style-name="Text_20_body">% <text:span text:style-name="T18">cd ~/alignment_files/examples</text:span></text:p>
      <text:p text:style-name="P2">Make a local c<text:span text:style-name="T25">o</text:span>py of a data file:</text:p>
      <text:p text:style-name="Standard">% <text:span text:style-name="T17">cp HIV/HIVSIV.fasta .</text:span></text:p>
      <text:p text:style-name="Standard"/>
      <text:p text:style-name="P1">Some basic info about the sequences:</text:p>
      <text:p text:style-name="Standard">% alignment-info HIVSIV.fasta</text:p>
      <text:p text:style-name="Standard"/>
      <text:p text:style-name="P1">Generate an alignment using <text:span text:style-name="T1">muscle</text:span>:</text:p>
      <text:p text:style-name="Standard">% muscle &lt; HIVSIV.fasta &gt; <text:span text:style-name="T30">HIVSIV-</text:span>muscle.fasta</text:p>
      <text:p text:style-name="Standard">% muscle -in HIVSIV.fasta -out <text:span text:style-name="T30">HIVSIV-</text:span>muscle.fasta <text:s text:c="24"/>// This is the same as the previous command.</text:p>
      <text:p text:style-name="P1"/>
      <text:p text:style-name="P1">Reverse the sequences, align them, and then flip them back:</text:p>
      <text:p text:style-name="Standard">% fasta-flip.pl HIVSIV.fasta &gt; <text:span text:style-name="T30">HIVSIV-</text:span>flipped.fasta <text:s text:c="36"/>// Step 1</text:p>
      <text:p text:style-name="Standard">% muscle -in <text:span text:style-name="T39">HIVSIV-</text:span>flipped.fasta | fasta-flip.pl &gt; <text:span text:style-name="T30">HIVSIV-</text:span>muscle-flipped.fasta <text:s text:c="5"/>// Steps 2 and 3</text:p>
      <text:p text:style-name="Standard">% fasta-flip.pl HIVSIV.fasta | muscle | fasta-flip.pl &gt; <text:span text:style-name="T30">HIVSIV-</text:span>muscle-flipped.fasta <text:s text:c="2"/>/// Steps 1, 2, and 3</text:p>
      <text:p text:style-name="Standard"/>
      <text:p text:style-name="P1">Look at both alignments:</text:p>
      <text:p text:style-name="Standard">% seaview <text:span text:style-name="T31">HIV</text:span><text:span text:style-name="T40">SIV</text:span><text:span text:style-name="T31">-</text:span>muscle.fasta &amp;</text:p>
      <text:p text:style-name="Standard">% seaview <text:span text:style-name="T31">HIV</text:span><text:span text:style-name="T40">SIV</text:span><text:span text:style-name="T31">-</text:span>muscle-flipped.fasta &amp;</text:p>
      <text:h text:style-name="Heading_20_1" text:outline-level="1">Exercise (Mafft/Probcons/SuiteMSA)</text:h>
      <text:p text:style-name="P3"><text:span text:style-name="T23">Align sequences and reversed sequences with </text:span><text:span text:style-name="T4">mafft</text:span></text:p>
      <text:p text:style-name="P9">% mafft HIVSIV.fasta &gt; <text:span text:style-name="T32">HIVSIV-</text:span>mafft<text:span text:style-name="T21">-quick</text:span>.fasta</text:p>
      <text:p text:style-name="Standard">% mafft <text:span text:style-name="T19">--auto </text:span>HIVSIV.fasta &gt; <text:span text:style-name="T32">HIVSIV-</text:span>mafft.fasta</text:p>
      <text:p text:style-name="Standard">% fasta-flip.pl HIVSIV.fasta | mafft <text:span text:style-name="T19">--auto </text:span>- | fasta-flip.pl &gt; <text:span text:style-name="T32">HIVSIV-</text:span>mafft-flipped.fasta</text:p>
      <text:p text:style-name="Standard">% cat HIVSIV.fasta | fasta-flip.pl | mafft <text:span text:style-name="T20">--auto </text:span>- | fasta-flip.pl &gt; <text:span text:style-name="T32">HIVSIV-</text:span>mafft-flipped.fasta</text:p>
      <text:p text:style-name="Standard"/>
      <text:p text:style-name="P3"><text:span text:style-name="T23">Align sequences and reversed sequences with </text:span><text:span text:style-name="T4">probcons</text:span></text:p>
      <text:p text:style-name="Standard">% probcons HIVSIV.fasta &gt; <text:span text:style-name="T32">HIVSIV-</text:span>probcons.fasta</text:p>
      <text:p text:style-name="Standard">% fasta-flip.pl HIVSIV.fasta &gt; <text:span text:style-name="T32">HIVSIV-</text:span>flipped.fasta</text:p>
      <text:p text:style-name="Standard">% probcons <text:span text:style-name="T41">HIVSIV-</text:span>flipped.fasta | fasta-flip.pl &gt; <text:span text:style-name="T32">HIVSIV-</text:span>probcons-flipped.fasta</text:p>
      <text:p text:style-name="Standard"/>
      <text:p text:style-name="P22">Compare alignments using SuiteMSA</text:p>
      <text:p text:style-name="Standard">% SuiteMSA &amp;</text:p>
      <text:p text:style-name="P12">&lt;Choose Pixel Plot&gt;</text:p>
      <text:p text:style-name="P12">&lt;Click on the left-most “...” to load a new alignment file, and choose <text:span text:style-name="T33">HIVSIV-m</text:span>afft.fasta&gt;</text:p>
      <text:p text:style-name="Standard">&lt; Also load <text:span text:style-name="T5">HIVSIV-m</text:span><text:span text:style-name="T1">afft-flipped.fasta</text:span>, <text:span text:style-name="T5">HIVSIV-p</text:span><text:span text:style-name="T1">robcons.fasta</text:span>, and <text:span text:style-name="T5">HIVSIV-p</text:span><text:span text:style-name="T1">robcons-flipped.fasta</text:span> &gt;</text:p>
      <text:p text:style-name="Standard"/>
      <text:p text:style-name="P1"><text:span text:style-name="T22">Q: </text:span>What is the spatial pattern of the differences?</text:p>
      <text:p text:style-name="Standard"/>
      <text:p text:style-name="P22">Construct an alignment that only contains homologies present in both mafft and probcons alignments</text:p>
      <text:p text:style-name="P10">% cat &gt; blank <text:s text:c="2"/>// Type <text:span text:style-name="T14">ENTER several times</text:span>, then press Ctrl-D</text:p>
      <text:p text:style-name="P10"/>
      <text:p text:style-name="P10"/>
      <text:p text:style-name="P10">% cat blank <text:s/>// It should print some blank lines to the screen.</text:p>
      <text:p text:style-name="P10"/>
      <text:p text:style-name="P25">% cat <text:span text:style-name="T34">HIV</text:span><text:span text:style-name="T42">SIV</text:span><text:span text:style-name="T34">-</text:span><text:span text:style-name="T22">mafft.fasta</text:span> blank <text:span text:style-name="T34">HIV</text:span><text:span text:style-name="T42">SIV</text:span><text:span text:style-name="T34">-</text:span><text:span text:style-name="T22">probcons.fasta</text:span> | alignment-consensus –strict=0.99 &gt; <text:span text:style-name="T34">HIV</text:span><text:span text:style-name="T43">SIV</text:span><text:span text:style-name="T34">-</text:span><text:span text:style-name="T22">mafft-probcons.fasta</text:span></text:p>
      <text:p text:style-name="P10">% seaview <text:span text:style-name="T35">HIV</text:span><text:span text:style-name="T43">SIV</text:span><text:span text:style-name="T35">-</text:span><text:span text:style-name="T22">mafft-probcons</text:span>.fasta &amp;</text:p>
      <text:h text:style-name="P29" text:outline-level="1"><text:soft-page-break/>Exercise (Prank)</text:h>
      <text:p text:style-name="P15"><text:span text:style-name="T25">Align a (short) 5S data set with </text:span><text:span text:style-name="T3">prank</text:span></text:p>
      <text:p text:style-name="Text_20_body">% <text:span text:style-name="T14">cd ~/alignment_files/examples/</text:span></text:p>
      <text:p text:style-name="Text_20_body"><text:span text:style-name="T14">% </text:span><text:span text:style-name="T15">cp 5S-rRNA/25.fasta .</text:span></text:p>
      <text:p text:style-name="Text_20_body">% prank -d=25.fasta -F</text:p>
      <text:p text:style-name="Text_20_body">% <text:span text:style-name="T27">cp</text:span> output.2.fas prank1.fasta</text:p>
      <text:p text:style-name="Text_20_body">% prank -d=25.fasta -F</text:p>
      <text:p text:style-name="Text_20_body">% <text:span text:style-name="T27">cp</text:span> output.2.fas prank2.fasta</text:p>
      <text:p text:style-name="Text_20_body">% prank -d=25.fasta -F</text:p>
      <text:p text:style-name="Text_20_body">% <text:span text:style-name="T27">cp</text:span> output.2.fas prank3.fasta</text:p>
      <text:p text:style-name="P1">Examine the three files</text:p>
      <text:p text:style-name="Standard">% seaview prank1.fasta &amp; seaview prank2.fasta &amp; seaview prank3.fasta &amp;</text:p>
      <text:p text:style-name="Standard"/>
      <text:p text:style-name="P23">Examine homologies in common between all three prank alignments</text:p>
      <text:p text:style-name="Standard">% cat prank1.fasta blank prank2.fasta blank prank3.fasta | alignment-consensus –strict=0.99 &gt; prank123.fasta</text:p>
      <text:p text:style-name="Standard">% seaview prank123.fasta &amp;</text:p>
      <text:p text:style-name="Standard"/>
      <text:p text:style-name="P5"><text:span text:style-name="T25">Repeat the exercise with HIVSIV.fasta (more interesting, but much slower </text:span><text:span text:style-name="T28">&gt; 10 minutes</text:span><text:span text:style-name="T25">)</text:span></text:p>
      <text:p text:style-name="P24"/>
      <text:p text:style-name="P19">% prank -d=<text:span text:style-name="T26">HIVSIV.fasta</text:span> -F <text:span text:style-name="T27">-o=run1 &amp;</text:span></text:p>
      <text:p text:style-name="P20">% prank -d=<text:span text:style-name="T26">HIVSIV.fasta</text:span> -F <text:span text:style-name="T27">-o=run2 &amp;</text:span></text:p>
      <text:p text:style-name="P26">&lt;wait for the prank runs to finish&gt;</text:p>
      <text:p text:style-name="P20"><text:span text:style-name="T27">% cp run1.2.fas </text:span><text:span text:style-name="T26">HIV-</text:span><text:span text:style-name="T27">prank1.fasta</text:span></text:p>
      <text:p text:style-name="P19">% <text:span text:style-name="T27">cp</text:span> <text:span text:style-name="T27">run2</text:span>.2.fas <text:span text:style-name="T26">HIV-</text:span>prank2.fasta</text:p>
      <text:p text:style-name="P11">% cat <text:span text:style-name="T26">HIV-prank1.fasta blank HIV-prank2.fasta </text:span>| alignment-consensus –strict=0.99 &gt; <text:span text:style-name="T26">HIV-</text:span>prank12.fasta</text:p>
      <text:p text:style-name="P5"><text:span text:style-name="T7">% seaview </text:span><text:span text:style-name="T8">HIV-prank12</text:span><text:span text:style-name="T7">.fasta &amp;</text:span></text:p>
      <text:h text:style-name="Heading_20_1" text:outline-level="1">Exercise</text:h>
      <text:p text:style-name="P4"><text:span text:style-name="T24">Align sequences with </text:span><text:span text:style-name="T2">fsa</text:span><text:span text:style-name="T24">. <text:s/>This will take some time.</text:span></text:p>
      <text:p text:style-name="P8">%<text:span text:style-name="T16"> cd ~/alignment_files/examples</text:span></text:p>
      <text:p text:style-name="P8">% fsa --fast --gapfactor 0 HIVSIV.fasta &gt; fsa0.fasta <text:span text:style-name="T24">&amp;</text:span> <text:s text:c="4"/><text:tab/>// This is similar to probcons – few gaps.</text:p>
      <text:p text:style-name="Standard">% fsa --fast --gapfactor 0.5 HIVSIV.fasta &gt; fsa0.5.fasta <text:span text:style-name="T24">&amp;</text:span> <text:s text:c="2"/>// This is the default. Some gaps.</text:p>
      <text:p text:style-name="Standard">% fsa --fast --gapfactor 1 HIVSIV.fasta &gt; fsa1.fasta <text:span text:style-name="T24">&amp;</text:span><text:tab/>// This is extra conservative, more gaps.</text:p>
      <text:p text:style-name="Standard"/>
      <text:p text:style-name="P7"><text:span text:style-name="T37">Look at the alignment lengths for the different </text:span><text:span text:style-name="T6">fsa</text:span><text:span text:style-name="T38"> parameters:</text:span></text:p>
      <text:p text:style-name="Standard">% alignment-info fsa0.fasta</text:p>
      <text:p text:style-name="Standard">% alignment-info fsa0.5.fasta</text:p>
      <text:p text:style-name="Standard">% alignment-info fsa1.fasta</text:p>
      <text:p text:style-name="Standard"/>
      <text:p text:style-name="P6"><text:span text:style-name="T24">Q: </text:span>How do the lengths of the <text:span text:style-name="T29">3 fsa </text:span>alignments <text:span text:style-name="T29">differ</text:span>?</text:p>
      <text:p text:style-name="P6"/>
      <text:p text:style-name="P6"><text:span text:style-name="T36">Q: </text:span><text:span text:style-name="T29">How do the </text:span><text:span text:style-name="T36">lengths</text:span><text:span text:style-name="T29"> compare to the alignment lengths for other programs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 Mono" style:font-size-asian="10pt" style:font-name-complex="FreeSans2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WenQuanYi Zen Hei Mono" style:font-name-complex="FreeSans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4in" fo:margin-right="0.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I</meta:initial-creator>
    <meta:creation-date>2012-04-28T00:07:09</meta:creation-date>
    <dc:date>2013-05-02T04:16:58</dc:date>
    <dc:creator>Benjamin Redelings</dc:creator>
    <meta:editing-duration>PT7H46M13S</meta:editing-duration>
    <meta:editing-cycles>94</meta:editing-cycles>
    <meta:generator>LibreOffice/4.0.2.2$Linux_X86_64 LibreOffice_project/400m0$Build-2</meta:generator>
    <meta:document-statistic meta:table-count="0" meta:image-count="0" meta:object-count="0" meta:page-count="3" meta:paragraph-count="97" meta:word-count="695" meta:character-count="4947" meta:non-whitespace-character-count="4085"/>
  </office:meta>
</office:document-meta>
</file>